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0"/>Internet</text:p>
      <text:p text:style-name="Standard"><text:s text:c="24"/>│</text:p>
      <text:p text:style-name="Standard"><text:s text:c="24"/>│</text:p>
      <text:p text:style-name="Standard"><text:s text:c="14"/>NGINX Ingress Controller</text:p>
      <text:p text:style-name="Standard"><text:s text:c="24"/>│</text:p>
      <text:p text:style-name="Standard"><text:s text:c="10"/>┌─────────────┴─────────────┐</text:p>
      <text:p text:style-name="Standard"><text:s text:c="10"/>│ <text:s text:c="26"/>│</text:p>
      <text:p text:style-name="Standard"><text:s text:c="6"/>ledger-api Service <text:s text:c="8"/>reporting Service</text:p>
      <text:p text:style-name="Standard"><text:s text:c="10"/>│ <text:s text:c="26"/>│</text:p>
      <text:p text:style-name="Standard"><text:s text:c="10"/>│ <text:s text:c="26"/>│</text:p>
      <text:p text:style-name="Standard"><text:s text:c="2"/>ledger-api Deployment <text:s text:c="6"/>reporting Deployment</text:p>
      <text:p text:style-name="Standard"><text:s text:c="10"/>│ <text:s text:c="26"/>│</text:p>
      <text:p text:style-name="Standard"><text:s text:c="10"/>├──────────────┐ <text:s text:c="11"/>│</text:p>
      <text:p text:style-name="Standard"><text:s text:c="10"/>│ <text:s text:c="13"/>│ <text:s text:c="11"/>│</text:p>
      <text:p text:style-name="Standard"><text:s text:c="6"/>ConfigMap <text:s text:c="4"/>Sealed Secret <text:s text:c="4"/>│</text:p>
      <text:p text:style-name="Standard"><text:s text:c="10"/>│ <text:s text:c="13"/>│ <text:s text:c="11"/>│</text:p>
      <text:p text:style-name="Standard"><text:s text:c="10"/>└───────Environment─────────┘</text:p>
      <text:p text:style-name="Standard"><text:s text:c="21"/>Variables</text:p>
      <text:p text:style-name="Standard"><text:s text:c="24"/>│</text:p>
      <text:p text:style-name="Standard"><text:s text:c="10"/>Dedicated ServiceAccounts</text:p>
      <text:p text:style-name="Standard"><text:s text:c="24"/>│</text:p>
      <text:p text:style-name="Standard"><text:s text:c="18"/>RBAC (Least Privilege)</text:p>
      <text:p text:style-name="Standard"><text:s text:c="24"/>│</text:p>
      <text:p text:style-name="Standard"><text:s text:c="13"/>Kyverno Admission Policies</text:p>
      <text:p text:style-name="Standard"><text:s text:c="24"/>│</text:p>
      <text:p text:style-name="Standard"><text:s text:c="6"/>Pod Security Standards (Restricted)</text:p>
      <text:p text:style-name="Standard"><text:s text:c="24"/>│</text:p>
      <text:p text:style-name="Standard"><text:s text:c="18"/>Kubernetes (Kind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1:39:02.491349256</meta:creation-date>
    <dc:date>2026-07-21T11:40:09.459390839</dc:date>
    <meta:editing-duration>PT1M9S</meta:editing-duration>
    <meta:editing-cycles>1</meta:editing-cycles>
    <meta:document-statistic meta:table-count="0" meta:image-count="0" meta:object-count="0" meta:page-count="1" meta:paragraph-count="28" meta:word-count="57" meta:character-count="976" meta:non-whitespace-character-count="346"/>
    <meta:generator>LibreOffice/24.2.7.2$Linux_X86_64 LibreOffice_project/420$Build-2</meta:generator>
  </office:meta>
</office:document-meta>
</file>